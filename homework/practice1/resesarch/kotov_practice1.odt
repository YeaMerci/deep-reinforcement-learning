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E0000032E5BE0B9A1BB7DA6E6.png" manifest:media-type="image/png"/>
  <manifest:file-entry manifest:full-path="Pictures/10000001000001770000004B04D1B8ED7DEE0708.png" manifest:media-type="image/png"/>
  <manifest:file-entry manifest:full-path="Pictures/100000010000028F000000E55AA95F7DC0827419.png" manifest:media-type="image/png"/>
  <manifest:file-entry manifest:full-path="Pictures/100000010000063E0000032EBC21D7667E19F65A.png" manifest:media-type="image/png"/>
  <manifest:file-entry manifest:full-path="Pictures/100000010000063E0000032E6560A631AAB127BD.png" manifest:media-type="image/png"/>
  <manifest:file-entry manifest:full-path="Pictures/100000010000062F00000331027E115EC058B4BE.png" manifest:media-type="image/png"/>
  <manifest:file-entry manifest:full-path="Pictures/1000000100000204000000373D2E9CDAD36088B6.png" manifest:media-type="image/png"/>
  <manifest:file-entry manifest:full-path="Pictures/100000010000062D0000032EAEF7F640464B0C6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bold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bold" officeooo:paragraph-rsid="0002c7f1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bold" officeooo:rsid="0002c7f1" officeooo:paragraph-rsid="0002c7f1" style:font-size-asian="14pt" style:font-size-complex="14pt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bold" officeooo:rsid="0002c7f1" officeooo:paragraph-rsid="0002c7f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bold" officeooo:rsid="0002c7f1" officeooo:paragraph-rsid="0002c7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bold" officeooo:paragraph-rsid="0002c7f1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normal" officeooo:rsid="0002c7f1" officeooo:paragraph-rsid="0002c7f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normal" officeooo:rsid="0002c7f1" officeooo:paragraph-rsid="00070f9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normal" officeooo:rsid="0002c7f1" officeooo:paragraph-rsid="0002c7f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normal" officeooo:rsid="0002c7f1" officeooo:paragraph-rsid="0002c7f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normal" officeooo:rsid="0002c7f1" officeooo:paragraph-rsid="0002c7f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normal" officeooo:rsid="00071d4e" officeooo:paragraph-rsid="00071d4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italic" fo:font-weight="bold" officeooo:rsid="0002c7f1" officeooo:paragraph-rsid="0002c7f1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italic" fo:font-weight="bold" officeooo:rsid="0002c7f1" officeooo:paragraph-rsid="00071d4e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italic" fo:font-weight="bold" officeooo:rsid="00071d4e" officeooo:paragraph-rsid="0002c7f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italic" fo:font-weight="bold" officeooo:rsid="0002c7f1" officeooo:paragraph-rsid="0002c7f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italic" fo:font-weight="bold" officeooo:rsid="0002c7f1" officeooo:paragraph-rsid="00070f9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02c7f1" officeooo:paragraph-rsid="0002c7f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070f94" officeooo:paragraph-rsid="00070f9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070f94" officeooo:paragraph-rsid="00070f94" fo:background-color="#00000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071d4e" officeooo:paragraph-rsid="00071d4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071d4e" officeooo:paragraph-rsid="00071d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Roboto" fo:font-size="12pt" fo:letter-spacing="normal" fo:font-style="normal" style:text-underline-style="none" fo:font-weight="normal" officeooo:rsid="00070f94" officeooo:paragraph-rsid="00070f9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loext:opacity="100%" style:font-name="Roboto" fo:font-size="12pt" fo:letter-spacing="normal" fo:font-style="italic" style:text-underline-style="none" fo:font-weight="bold" officeooo:rsid="00070f94" officeooo:paragraph-rsid="00070f94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Roboto" fo:font-size="12pt" fo:letter-spacing="normal" fo:font-style="italic" style:text-underline-style="none" fo:font-weight="bold" officeooo:rsid="00070f94" officeooo:paragraph-rsid="00070f94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65a4" loext:opacity="100%" style:font-name="Roboto" fo:font-size="12pt" fo:letter-spacing="normal" fo:font-style="italic" fo:font-weight="bold" officeooo:rsid="00070f94" officeooo:paragraph-rsid="00070f9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65a4" loext:opacity="100%" style:font-name="Roboto" fo:font-size="12pt" fo:letter-spacing="normal" fo:font-style="italic" fo:font-weight="bold" officeooo:rsid="00070f94" officeooo:paragraph-rsid="00070f9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2c7f1"/>
    </style:style>
    <style:style style:name="P29" style:family="paragraph" style:parent-style-name="Standard">
      <loext:graphic-properties draw:fill="solid" draw:fill-color="#011627"/>
      <style:paragraph-properties fo:background-color="#011627" fo:padding="0in" fo:border="none" style:shadow="none"/>
      <style:text-properties officeooo:paragraph-rsid="00070f94"/>
    </style:style>
    <style:style style:name="P30" style:family="paragraph" style:parent-style-name="Standard">
      <loext:graphic-properties draw:fill="solid" draw:fill-color="#011627"/>
      <style:paragraph-properties fo:background-color="#011627" fo:padding="0in" fo:border="none" style:shadow="none"/>
      <style:text-properties fo:background-color="#000000"/>
    </style:style>
    <style:style style:name="P31" style:family="paragraph" style:parent-style-name="Standard">
      <loext:graphic-properties draw:fill="solid" draw:fill-color="#011627"/>
      <style:paragraph-properties fo:background-color="#011627" fo:padding="0in" fo:border="none" style:shadow="none"/>
      <style:text-properties officeooo:paragraph-rsid="00071d4e"/>
    </style:style>
    <style:style style:name="P3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4pt" fo:letter-spacing="normal" fo:font-style="normal" fo:font-weight="bold" officeooo:rsid="0002c7f1" officeooo:paragraph-rsid="0002c7f1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02c7f1" officeooo:paragraph-rsid="0002c7f1" style:font-size-asian="12pt" style:font-weight-asian="bold" style:font-size-complex="12pt" style:font-weight-complex="bold"/>
    </style:style>
    <style:style style:name="T1" style:family="text">
      <style:text-properties fo:font-size="14.25pt" style:font-weight-asian="bold" style:font-weight-complex="bold"/>
    </style:style>
    <style:style style:name="T2" style:family="text">
      <style:text-properties officeooo:rsid="0002c7f1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0.5pt" style:font-weight-asian="bold" style:font-weight-complex="bold"/>
    </style:style>
    <style:style style:name="T5" style:family="text">
      <style:text-properties style:text-line-through-style="none" style:text-line-through-type="none" fo:font-size="12pt" style:text-underline-style="none" fo:font-weight="normal" style:text-blinking="false" style:font-size-asian="12pt" style:font-size-complex="12pt" loext:padding="0in" loext:border="none"/>
    </style:style>
    <style:style style:name="T6" style:family="text">
      <style:text-properties style:text-underline-style="none" style:font-size-asian="10.5pt"/>
    </style:style>
    <style:style style:name="T7" style:family="text">
      <style:text-properties fo:font-variant="normal" fo:text-transform="none" fo:color="#000000" loext:opacity="100%" style:font-name="Roboto" fo:font-size="14pt" fo:letter-spacing="normal" fo:font-style="italic" fo:font-weight="bold" officeooo:rsid="0002c7f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2pt" style:text-underline-style="none" fo:font-weight="normal" style:font-size-asian="12pt" style:font-size-complex="12pt"/>
    </style:style>
    <style:style style:name="T9" style:family="text">
      <style:text-properties fo:font-size="12pt" fo:font-style="normal" fo:font-weight="normal" officeooo:rsid="00070f9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d6deeb" loext:opacity="100%" style:font-name="JetBrai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d6deeb" loext:opacity="100%" style:font-name="JetBrains Mono" fo:font-size="9pt" fo:font-style="normal" fo:font-weight="normal" officeooo:rsid="00070f94" style:font-size-asian="9pt" style:font-style-asian="normal" style:font-weight-asian="normal"/>
    </style:style>
    <style:style style:name="T12" style:family="text">
      <style:text-properties fo:color="#c792ea" loext:opacity="100%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5f7e97" loext:opacity="100%" style:font-name="JetBrai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637777" loext:opacity="100%" style:font-name="JetBrai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637777" loext:opacity="100%" style:font-name="JetBrains Mono" fo:font-size="9pt" fo:font-style="italic" fo:font-weight="normal" officeooo:rsid="00070f94" style:font-size-asian="9pt" style:font-style-asian="italic" style:font-weight-asian="normal"/>
    </style:style>
    <style:style style:name="T17" style:family="text">
      <style:text-properties fo:color="#637777" loext:opacity="100%" style:font-name="JetBrains Mono" fo:font-size="9pt" fo:font-style="italic" fo:font-weight="normal" officeooo:rsid="00071d4e" style:font-size-asian="9pt" style:font-style-asian="italic" style:font-weight-asian="normal"/>
    </style:style>
    <style:style style:name="T18" style:family="text">
      <style:text-properties fo:color="#637777" loext:opacity="100%" style:font-name="JetBrains Mono" fo:font-size="9pt" fo:font-style="italic" fo:font-weight="normal" fo:background-color="#000000" loext:char-shading-value="0" style:font-size-asian="9pt" style:font-style-asian="italic" style:font-weight-asian="normal"/>
    </style:style>
    <style:style style:name="T19" style:family="text">
      <style:text-properties fo:color="#637777" loext:opacity="100%" style:font-name="JetBrains Mono" fo:font-size="9pt" fo:font-style="italic" fo:font-weight="normal" officeooo:rsid="00070f94" fo:background-color="#000000" loext:char-shading-value="0" style:font-size-asian="9pt" style:font-style-asian="italic" style:font-weight-asian="normal"/>
    </style:style>
    <style:style style:name="T20" style:family="text">
      <style:text-properties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T24" style:family="text">
      <style:text-properties fo:font-style="italic" style:font-size-asian="10.5pt" style:font-style-asian="italic" style:font-style-complex="italic"/>
    </style:style>
    <style:style style:name="T25" style:family="text">
      <style:text-properties fo:font-style="italic" style:text-underline-style="none" fo:font-weight="bold" style:font-size-asian="10.5pt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070f94" style:font-size-asian="10.5pt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style:font-size-asian="10.5pt" style:font-style-asian="italic" style:font-style-complex="italic"/>
    </style:style>
    <style:style style:name="T28" style:family="text">
      <style:text-properties style:font-size-asian="10.5pt"/>
    </style:style>
    <style:style style:name="T29" style:family="text">
      <style:text-properties fo:color="#addb67" loext:opacity="100%" style:font-name="JetBrai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addb67" loext:opacity="100%" style:font-name="JetBrains Mono" fo:font-size="9pt" fo:font-style="normal" fo:font-weight="normal" officeooo:rsid="00070f94" style:font-size-asian="9pt" style:font-style-asian="normal" style:font-weight-asian="normal"/>
    </style:style>
    <style:style style:name="T31" style:family="text">
      <style:text-properties fo:background-color="transparent" loext:char-shading-value="0" style:font-style-asian="italic" style:font-style-complex="italic"/>
    </style:style>
    <style:style style:name="T32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ecc48d" loext:opacity="100%" style:font-name="JetBrai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RL Course 2023 </text:p>
      <text:p text:style-name="P2">Домашнее задание 1</text:p>
      <text:p text:style-name="P6"><text:span text:style-name="T2">Тема: </text:span><text:span text:style-name="T1">алгоритм Кросс-Энтропии</text:span></text:p>
      <text:p text:style-name="P1"/>
      <text:p text:style-name="P1"/>
      <text:p text:style-name="P1"/>
      <text:p text:style-name="P3"/>
      <text:p text:style-name="P3"/>
      <text:p text:style-name="P10">Проверил </text:p>
      <text:p text:style-name="P10">Антон Плаксин</text:p>
      <text:p text:style-name="P9"/>
      <text:p text:style-name="P9"/>
      <text:p text:style-name="P9"/>
      <text:p text:style-name="P9">Подготовил</text:p>
      <text:p text:style-name="P9">Котов Дании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8">30 сентября 2023 года</text:p>
      <text:p text:style-name="P8"><text:soft-page-break/><text:span text:style-name="T3">Задание 1</text:span></text:p>
      <text:p text:style-name="P13"/>
      <text:p text:style-name="P13">Описание:</text:p>
      <text:p text:style-name="P32"><text:span text:style-name="T8">Пользуясь алгоритмом Кросс-Энтропии обучить агента решать задачу </text:span><text:a xlink:type="simple" xlink:href="https://www.gymlibrary.dev/environments/toy_text/taxi/" office:target-frame-name="_blank" xlink:show="new" text:style-name="Internet_20_link" text:visited-style-name="Visited_20_Internet_20_Link"><text:span text:style-name="T5">Taxi-v3 из Gym</text:span></text:a><text:span text:style-name="T8">. Исследовать гиперпараметры алгоритма и выбрать лучшие.</text:span></text:p>
      <text:p text:style-name="P13">Результаты:</text:p>
      <text:p text:style-name="P19"><draw:frame draw:style-name="fr1" draw:name="Image4" text:anchor-type="char" svg:x="0.0555in" svg:y="0.1118in" svg:width="6.9252in" svg:height="3.5654in" draw:z-index="2"><draw:image xlink:href="Pictures/100000010000062D0000032EAEF7F640464B0C65.png" xlink:type="simple" xlink:show="embed" xlink:actuate="onLoad" draw:mime-type="image/png"/></draw:frame></text:p>
      <text:p text:style-name="P19">Алгоритм быстро сходится (*но не всегда из-за большого влияния стохастики на обновление политики) к <text:span text:style-name="T3">mean total reward 7~8 </text:span><text:span text:style-name="T21">[далее </text:span><text:span text:style-name="T22">MTR</text:span><text:span text:style-name="T21">].</text:span> <text:s/>Важно отметить, что я сделал планировщик для плавного расширения квантиля, что так же улучшает сходимость. С гиперпараметрами ниже алгоритм в среднем сходится за 15 итераций.</text:p>
      <text:p text:style-name="P19"/>
      <text:p text:style-name="P27"><text:span text:style-name="T20">Гиперпараметры</text:span></text:p>
      <text:p text:style-name="P30"><text:span text:style-name="T10">iterations</text:span><text:span text:style-name="T12">=</text:span><text:span text:style-name="T13">50</text:span><text:span text:style-name="T14"> <text:s/></text:span><text:span text:style-name="T15"># Кол-во итераций 30<text:line-break/></text:span><text:span text:style-name="T10">trajectory_n</text:span><text:span text:style-name="T12">=</text:span><text:span text:style-name="T13">500</text:span><text:span text:style-name="T14"> <text:s/></text:span><text:span text:style-name="T15"># Кол-во траекторий 500<text:line-break/></text:span><text:span text:style-name="T10">trajectory_len</text:span><text:span text:style-name="T12">=</text:span><text:span text:style-name="T13">170</text:span><text:span text:style-name="T14"> <text:s/></text:span><text:span text:style-name="T15"># Длина траекторий 170<text:line-break/></text:span><text:span text:style-name="T10">q_param</text:span><text:span text:style-name="T12">=</text:span><text:span text:style-name="T13">0.53</text:span><text:span text:style-name="T14"> <text:s/></text:span><text:span text:style-name="T15"># Квантиль 0.</text:span><text:span text:style-name="T16">53</text:span><text:span text:style-name="T15"><text:line-break/></text:span><text:span text:style-name="T10">save_threshold</text:span><text:span text:style-name="T12">=</text:span><text:span text:style-name="T13">7. <text:s/></text:span><text:span text:style-name="T15"># Сохран</text:span><text:span text:style-name="T16">ить политику при M</text:span><text:span text:style-name="T15"> &gt; 6.5 Mean Total Reward</text:span></text:p>
      <text:p text:style-name="P20"/>
      <text:p text:style-name="P17"><text:span text:style-name="T20">Вывод:</text:span></text:p>
      <text:p text:style-name="P17"><text:span text:style-name="T9">Данный подход имеет недостатки, главным образом обновление политики сильно зависит от случайности. Алгоритм плох в стохастических средах, имеет конечное пространство действий. Но для решения простых задач его можно применять.</text:span></text:p>
      <text:p text:style-name="P4"><text:soft-page-break/>Задание 2</text:p>
      <text:p text:style-name="P13"/>
      <text:p text:style-name="P13">Описание:</text:p>
      <text:p text:style-name="P33">Реализовать алгоритм Кросс-Энтропии с двумя типами сглаживания, указанными в лекции 1. При выбранных в пункте 1 гиперпараметров сравнить их результаты с результатами алгоритма без сглаживания.</text:p>
      <text:p text:style-name="P18"/>
      <text:p text:style-name="P28"><text:span text:style-name="T7">Результаты:</text:span></text:p>
      <text:p text:style-name="P28"><text:span text:style-name="T7"/></text:p>
      <text:p text:style-name="P26"><text:span text:style-name="T31">Гиперпараметры</text:span></text:p>
      <text:p text:style-name="P29"><text:span text:style-name="T10">iterations</text:span><text:span text:style-name="T12">=</text:span><text:span text:style-name="T13">50</text:span><text:span text:style-name="T14">, <text:s/></text:span><text:span text:style-name="T15"># Кол-во итераций<text:line-break/></text:span><text:span text:style-name="T10">trajectory_n</text:span><text:span text:style-name="T12">=</text:span><text:span text:style-name="T13">500</text:span><text:span text:style-name="T14">, <text:s/></text:span><text:span text:style-name="T15"># Кол-во траекторий<text:line-break/></text:span><text:span text:style-name="T10">trajectory_len</text:span><text:span text:style-name="T12">=</text:span><text:span text:style-name="T13">170</text:span><text:span text:style-name="T14">, <text:s/></text:span><text:span text:style-name="T15"># Длина траекторий<text:line-break/></text:span><text:span text:style-name="T10">q_param</text:span><text:span text:style-name="T12">=</text:span><text:span text:style-name="T13">0.52</text:span><text:span text:style-name="T14">, <text:s/></text:span><text:span text:style-name="T15"># Квантиль<text:line-break/></text:span><text:span text:style-name="T10">save_threshold</text:span><text:span text:style-name="T12">=</text:span><text:span text:style-name="T13">4.</text:span><text:span text:style-name="T14">, <text:s/></text:span><text:span text:style-name="T18"># Сохран</text:span><text:span text:style-name="T19">ить политику при <text:s/></text:span><text:span text:style-name="T18">&gt; </text:span><text:span text:style-name="T19">4.</text:span><text:span text:style-name="T18"> Mean Total Reward</text:span><text:span text:style-name="T14"><text:line-break/></text:span><text:span text:style-name="T10">smoothing</text:span><text:span text:style-name="T12">=</text:span><text:span text:style-name="T30">”laplac”</text:span><text:span text:style-name="T14">, <text:s/></text:span><text:span text:style-name="T16"># Сглаживание по Лапласу</text:span><text:span text:style-name="T14"><text:line-break/></text:span><text:span text:style-name="T10">alpha</text:span><text:span text:style-name="T12">=</text:span><text:span text:style-name="T13">1 <text:s/></text:span><text:span text:style-name="T16"># Лямбда Сглаживания по Лапласу</text:span></text:p>
      <text:p text:style-name="P29"><text:span text:style-name="T11">decay</text:span><text:span text:style-name="T12">=</text:span><text:span text:style-name="T13">0.5 </text:span><text:span text:style-name="T16"># Лямбды <text:s/>Сглаживания по Policy</text:span></text:p>
      <text:p text:style-name="P13"/>
      <text:list xml:id="list2054274035" text:style-name="L4">
        <text:list-item>
          <text:p text:style-name="P24">Laplace smoothing</text:p>
        </text:list-item>
      </text:list>
      <text:p text:style-name="P25"><draw:frame draw:style-name="fr1" draw:name="Image3" text:anchor-type="char" svg:x="0.5839in" svg:y="0.2256in" svg:width="5.6701in" svg:height="0.6043in" draw:z-index="1"><draw:image xlink:href="Pictures/1000000100000204000000373D2E9CDAD36088B6.png" xlink:type="simple" xlink:show="embed" xlink:actuate="onLoad" draw:mime-type="image/png"/></draw:frame></text:p>
      <text:p text:style-name="P25"/>
      <text:p text:style-name="P25"/>
      <text:p text:style-name="P25"/>
      <text:p text:style-name="P25"><draw:frame draw:style-name="fr1" draw:name="Image2" text:anchor-type="char" svg:x="0in" svg:y="0.1217in" svg:width="6.9252in" svg:height="3.5272in" draw:z-index="3"><draw:image xlink:href="Pictures/100000010000063E0000032E6560A631AAB127BD.png" xlink:type="simple" xlink:show="embed" xlink:actuate="onLoad" draw:mime-type="image/png"/></draw:frame></text:p>
      <text:p text:style-name="P23"><text:soft-page-break/></text:p>
      <text:p text:style-name="P23"/>
      <text:p text:style-name="P23">Алгоритм сходится как и ожидалось дольше. Сглаживание по Лапласу может сойтисть к <text:span text:style-name="T3">5~6 <text:s/></text:span><text:span text:style-name="T23">MTR</text:span><text:span text:style-name="T24">, при условии, что сглаживание не будет постоянным, так как оно полезно для развдеки (exploration), но нам абсолютно не хочется иметь даже малую вероятность скинуть пассажира в каждом состоянии на постоянной основе. Выше на графике постоянное сглаживание приводит к </text:span><text:span text:style-name="T23">-</text:span><text:span text:style-name="T4">162 <text:s/></text:span><text:span text:style-name="T23">MTR</text:span><text:span text:style-name="T28">, после обучение не происходит. Чётко видно, что пора отойти от упора на разведку к эксплуатации нашей политике. </text:span></text:p>
      <text:p text:style-name="P23"/>
      <text:p text:style-name="P23"/>
      <text:p text:style-name="P25"/>
      <text:p text:style-name="P25"><draw:frame draw:style-name="fr2" draw:name="Image6" text:anchor-type="char" svg:width="6.9252in" svg:height="3.5272in" draw:z-index="5"><draw:image xlink:href="Pictures/100000010000063E0000032EBC21D7667E19F65A.png" xlink:type="simple" xlink:show="embed" xlink:actuate="onLoad" draw:mime-type="image/png"/></draw:frame></text:p>
      <text:p text:style-name="P25"/>
      <text:p text:style-name="P25"/>
      <text:p text:style-name="P23">И результат выше это подтверждает. Здесь параметр <text:span text:style-name="T3">лямбда изначально 1</text:span>, но обнуляется при достижении половины итераций. За <text:span text:style-name="T3">33 итерации</text:span> алгоритм сошёлся к <text:span text:style-name="T3">4.22</text:span> <text:span text:style-name="T23">MTR </text:span><text:span text:style-name="T28">с гиперпараметрами из первой попытки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list xml:id="list154816963965365" text:continue-numbering="true" text:style-name="L4">
        <text:list-item>
          <text:p text:style-name="P24">Policy smoothing</text:p>
          <text:p text:style-name="P24"/>
        </text:list-item>
      </text:list>
      <text:p text:style-name="P13"><draw:frame draw:style-name="fr1" draw:name="Image1" text:anchor-type="char" svg:x="1.3575in" svg:y="0.0661in" svg:width="4.1209in" svg:height="0.8244in" draw:z-index="0"><draw:image xlink:href="Pictures/10000001000001770000004B04D1B8ED7DEE0708.png" xlink:type="simple" xlink:show="embed" xlink:actuate="onLoad" draw:mime-type="image/png"/></draw:frame></text:p>
      <text:p text:style-name="P13"/>
      <text:p text:style-name="P13"/>
      <text:p text:style-name="P11"/>
      <text:p text:style-name="P12"/>
      <text:p text:style-name="P21">Данный алгоритм сходится быстрее, чем сглаживание по Лапласу.</text:p>
      <text:p text:style-name="P21">Здесь обновлению политики сглаживание не мешает со временем уходить от развдеки (т.е. занулить вероятность скинуть пассажира везде, кроме состояний, где это нужно). Гиперпараметры теже, что и при Лапласе. За <text:span text:style-name="T3">30 итераций</text:span> алгоритм сходлиться к <text:span text:style-name="T3">7~8</text:span> <text:span text:style-name="T26">MTR </text:span>(7.07 последняя попытка).</text:p>
      <text:p text:style-name="P13"/>
      <text:p text:style-name="P13"><draw:frame draw:style-name="fr1" draw:name="Image5" text:anchor-type="char" svg:x="0in" svg:y="0.0898in" svg:width="6.9252in" svg:height="3.5272in" draw:z-index="4"><draw:image xlink:href="Pictures/100000010000063E0000032E5BE0B9A1BB7DA6E6.png" xlink:type="simple" xlink:show="embed" xlink:actuate="onLoad" draw:mime-type="image/png"/></draw:frame></text:p>
      <text:p text:style-name="P13"/>
      <text:p text:style-name="P13">Вывод:</text:p>
      <text:p text:style-name="P22">Оба типа сглаживания призваны бороться с зависимостью обновления политики от стохастичности, т.е. увеличивают exploration, но важно держать баланас между разведкой и эксплуатацией.</text:p>
      <text:p text:style-name="P5"/>
      <text:p text:style-name="P5"/>
      <text:p text:style-name="P4"><text:soft-page-break/>Задание 3</text:p>
      <text:p text:style-name="P13"/>
      <text:p text:style-name="P13"/>
      <text:p text:style-name="P16"><text:span text:style-name="T20">Описание:</text:span></text:p>
      <text:p text:style-name="P16"><draw:frame draw:style-name="fr1" draw:name="Image7" text:anchor-type="char" svg:x="0.078in" svg:y="0.1972in" svg:width="6.9252in" svg:height="2.4209in" draw:z-index="6"><draw:image xlink:href="Pictures/100000010000028F000000E55AA95F7DC0827419.png" xlink:type="simple" xlink:show="embed" xlink:actuate="onLoad" draw:mime-type="image/png"/></draw:frame></text:p>
      <text:p text:style-name="P33">Реализовать модификацию алгоритм Кросс-Энтропии для стохастических сред, указанную в лекции 1. Сравнить ее результат с алгоритмами из пунктов 1 и 2.</text:p>
      <text:p text:style-name="Text_20_body"/>
      <text:p text:style-name="P13">Результаты:</text:p>
      <text:p text:style-name="P15"/>
      <text:p text:style-name="P31"><text:span text:style-name="T10">num_policies</text:span><text:span text:style-name="T12">=</text:span><text:span text:style-name="T13">500</text:span><text:span text:style-name="T14">, </text:span><text:span text:style-name="T15"># Кол-во </text:span><text:span text:style-name="T17">политик</text:span><text:span text:style-name="T14"><text:line-break/></text:span><text:span text:style-name="T10">iterations</text:span><text:span text:style-name="T12">=</text:span><text:span text:style-name="T13">50</text:span><text:span text:style-name="T14">, <text:s/></text:span><text:span text:style-name="T15"># Кол-во итераций<text:line-break/></text:span><text:span text:style-name="T10">trajectory_n</text:span><text:span text:style-name="T12">=</text:span><text:span text:style-name="T13">15</text:span><text:span text:style-name="T14">, <text:s/></text:span><text:span text:style-name="T15"># Кол-во траекторий<text:line-break/></text:span><text:span text:style-name="T10">trajectory_len</text:span><text:span text:style-name="T12">=</text:span><text:span text:style-name="T13">100</text:span><text:span text:style-name="T14">, <text:s/></text:span><text:span text:style-name="T15"># Длина траекторий<text:line-break/></text:span><text:span text:style-name="T10">q_param</text:span><text:span text:style-name="T12">=</text:span><text:span text:style-name="T13">0.6</text:span><text:span text:style-name="T14">, <text:s/></text:span><text:span text:style-name="T15"># Квантиль<text:line-break/></text:span><text:span text:style-name="T10">save_threshold</text:span><text:span text:style-name="T12">=</text:span><text:span text:style-name="T13">1.5</text:span><text:span text:style-name="T14">,<text:line-break/></text:span><text:span text:style-name="T10">smoothing</text:span><text:span text:style-name="T12">=</text:span><text:span text:style-name="T33">"policy"</text:span><text:span text:style-name="T14">,<text:line-break/></text:span><text:span text:style-name="T10">decay</text:span><text:span text:style-name="T12">=</text:span><text:span text:style-name="T13">0.5</text:span></text:p>
      <text:p text:style-name="P13"/>
      <text:p text:style-name="P21">Алгоритм ‘сходится’ к <text:span text:style-name="T3">-200 </text:span><text:span text:style-name="T26">MTR, </text:span><text:span text:style-name="T6">после чего обучение прекращается. Так происходит вследвствии нахожождения ‘оптимальной’ для алгоритма политики бездействия.</text:span></text:p>
      <text:p text:style-name="P21"><text:span text:style-name="T6">Любой подбор гиперпараметров не смог мне помоч справиться с данной проблемой.</text:span></text:p>
      <text:p text:style-name="P21"><text:span text:style-name="T6"/></text:p>
      <text:p text:style-name="P13"/>
      <text:p text:style-name="P14"/>
      <text:p text:style-name="P14"><draw:frame draw:style-name="fr1" draw:name="Image8" text:anchor-type="char" svg:x="-0.1543in" svg:y="0.0327in" svg:width="6.9252in" svg:height="3.5736in" draw:z-index="7"><draw:image xlink:href="Pictures/100000010000062F00000331027E115EC058B4BE.png" xlink:type="simple" xlink:show="embed" xlink:actuate="onLoad" draw:mime-type="image/png"/></draw:frame><text:soft-page-break/></text:p>
      <text:p text:style-name="P14">Вывод:</text:p>
      <text:p text:style-name="P21">Если среда не детрминированна, то мы будем детерминированными. Такая логика должна помочь алгоритму в целом адаптироваться к стохастичной среде, однако такой подход кратно увеливает время сходимости алгоритма (в сравнении с 1. и 2. заданиями) и не всегда работает из-за большого кол-ва шумовых траекторий в элитных политиках (тех, где мат. ожидание награды по всем траекториям прошло по квантилю)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30T15:48:15.485640960</dc:date>
    <meta:editing-duration>PT4H35M</meta:editing-duration>
    <meta:editing-cycles>6</meta:editing-cycles>
    <meta:generator>LibreOffice/7.4.7.2$Linux_X86_64 LibreOffice_project/40$Build-2</meta:generator>
    <meta:document-statistic meta:table-count="0" meta:image-count="8" meta:object-count="0" meta:page-count="7" meta:paragraph-count="42" meta:word-count="528" meta:character-count="3904" meta:non-whitespace-character-count="3396"/>
  </office:meta>
</office:document-meta>
</file>